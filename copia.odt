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d00" officeooo:paragraph-rsid="001d3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iii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19:21:52.373737100</meta:creation-date>
    <dc:date>2026-07-07T20:26:57.265170000</dc:date>
    <meta:editing-duration>PT19S</meta:editing-duration>
    <meta:editing-cycles>2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