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ca51"/>
    </style:style>
    <style:style style:name="P2" style:family="paragraph" style:parent-style-name="Standard">
      <style:text-properties officeooo:rsid="001e54fe" officeooo:paragraph-rsid="001e54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 - Empreendedorismos foi legal</text:p>
      <text:p text:style-name="Standard">2 - Análise e projeto de sistema foi bom quando acabou</text:p>
      <text:p text:style-name="Standard">3 - Desenvolvimento de software para web</text:p>
      <text:p text:style-name="Standard">4 - Interação Humano Computador foi bem interessante</text:p>
      <text:p text:style-name="Standard"/>
      <text:p text:style-name="P1"/>
      <text:p text:style-name="P2">dnede</text:p>
      <text:p text:style-name="P2">dnwjd</text:p>
      <text:p text:style-name="P2">xmejdej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7T19:21:52.373737100</meta:creation-date>
    <dc:date>2026-07-07T19:39:16.871435300</dc:date>
    <meta:editing-duration>PT3M1S</meta:editing-duration>
    <meta:editing-cycles>3</meta:editing-cycles>
    <meta:generator>LibreOffice/26.2.4.2$Windows_X86_64 LibreOffice_project/0229ac93fcf0d7cbc6376066c6f35021cef002dc</meta:generator>
    <meta:document-statistic meta:table-count="0" meta:image-count="0" meta:object-count="0" meta:page-count="1" meta:paragraph-count="7" meta:word-count="34" meta:character-count="194" meta:non-whitespace-character-count="167"/>
  </office:meta>
</office:document-meta>
</file>