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ca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 - Empreendedorismos foi legal</text:p>
      <text:p text:style-name="Standard">2 - Análise e projeto de sistema foi bom quando acabou</text:p>
      <text:p text:style-name="Standard">3 - Desenvolvimento de software para web</text:p>
      <text:p text:style-name="Standard">4 - Interação Humano Computador foi bem interessante</text:p>
      <text:p text:style-name="Standard"/>
      <text:p text:style-name="P1">jededuwjdiwj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7T19:21:52.373737100</meta:creation-date>
    <dc:date>2026-07-07T19:36:43.497127200</dc:date>
    <meta:editing-duration>PT28S</meta:editing-duration>
    <meta:editing-cycles>2</meta:editing-cycles>
    <meta:generator>LibreOffice/26.2.4.2$Windows_X86_64 LibreOffice_project/0229ac93fcf0d7cbc6376066c6f35021cef002dc</meta:generator>
    <meta:document-statistic meta:table-count="0" meta:image-count="0" meta:object-count="0" meta:page-count="1" meta:paragraph-count="5" meta:word-count="32" meta:character-count="189" meta:non-whitespace-character-count="162"/>
  </office:meta>
</office:document-meta>
</file>